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rip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lpha,p?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yes, some no</text:p>
          </table:table-cell>
          <table:table-cell office:value-type="string" calcext:value-type="string">
            <text:p>the ones with max energy loss below 2 MeV likely are not alpha,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not clear, need to see individual trace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yes, some 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not clear, need to see individual trac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yes, some no</text:p>
          </table:table-cell>
          <table:table-cell office:value-type="string" calcext:value-type="string">
            <text:p>the ones with max energy loss below 2 MeV likely are not alpha,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bably n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clear, need to see individual trac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t no</text:p>
          </table:table-cell>
          <table:table-cell office:value-type="string" calcext:value-type="string">
            <text:p>not clear, need to see individual trac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bably not</text:p>
          </table:table-cell>
          <table:table-cell office:value-type="string" calcext:value-type="string">
            <text:p>energy loss too high, traces climb up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cause they fall between stp 10-16, consistent with exp (MA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 yes, some 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fficult to see in this way, need the d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ergy loss too hig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 yes</text:p>
          </table:table-cell>
          <table:table-cell office:value-type="string" calcext:value-type="string">
            <text:p>because they fall between stp 11-16, consistent with exp (M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yes, some no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fficult to see in this way, need the d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ergy loss too hig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 yes</text:p>
          </table:table-cell>
          <table:table-cell office:value-type="string" calcext:value-type="string">
            <text:p>because they fall between stp 11-16, consistent with exp (MA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yes, some no</text:p>
          </table:table-cell>
          <table:table-cell office:value-type="string" calcext:value-type="string">
            <text:p>the ones with between max energy loss 2.5-3 MeV likely 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fficult to see in this way, need the d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energy loss too high, probably most of them are not alpah,p but maybe a few a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 yes</text:p>
          </table:table-cell>
          <table:table-cell office:value-type="string" calcext:value-type="string">
            <text:p>because they fall between stp 12-16, consistent with exp (MA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yes, some no</text:p>
          </table:table-cell>
          <table:table-cell office:value-type="string" calcext:value-type="string">
            <text:p>the ones with between max energy loss 2.5-3 MeV likely 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fficult to see in this way, need the data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energy loss too high, probably most of them are not alpah,p but maybe a few a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yes, some no</text:p>
          </table:table-cell>
          <table:table-cell office:value-type="string" calcext:value-type="string">
            <text:p>there is a gap in energy loss around 2.2 MeV, that might help with identific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yes, some no</text:p>
          </table:table-cell>
          <table:table-cell office:value-type="string" calcext:value-type="string">
            <text:p>need to see individual trac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fficult to see in this way, need the da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ergy loss too 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0:30:03.171857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0:30:22.036582505</meta:creation-date>
    <meta:editing-duration>PT2M24S</meta:editing-duration>
    <meta:editing-cycles>3</meta:editing-cycles>
    <meta:generator>LibreOffice/6.0.7.3$Linux_X86_64 LibreOffice_project/00m0$Build-3</meta:generator>
    <dc:date>2020-12-14T11:18:35.564730020</dc:date>
    <meta:document-statistic meta:table-count="1" meta:cell-count="239" meta:object-count="0"/>
  </office:meta>
</office:document-meta>
</file>